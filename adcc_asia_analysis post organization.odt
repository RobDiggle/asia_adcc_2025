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style:style style:name="P1" style:parent-style-name="Normal" style:master-page-name="MP0" style:family="paragraph">
      <style:paragraph-properties fo:break-before="page"/>
    </style:style>
    <style:style style:name="T2" style:parent-style-name="DefaultParagraphFont" style:family="text">
      <style:text-properties fo:font-weight="bold" style:font-weight-asian="bold" style:font-weight-complex="bold"/>
    </style:style>
    <style:style style:name="T3" style:parent-style-name="DefaultParagraphFont" style:family="text">
      <style:text-properties fo:font-weight="bold" style:font-weight-asian="bold" style:font-weight-complex="bold"/>
    </style:style>
    <style:style style:name="T4" style:parent-style-name="DefaultParagraphFont" style:family="text">
      <style:text-properties fo:font-weight="bold" style:font-weight-asian="bold" style:font-weight-complex="bold"/>
    </style:style>
  </office:automatic-styles>
  <office:body>
    <office:text text:use-soft-page-breaks="true">
      <text:p text:style-name="P1">the instagram image carousels will be as follows: 1. Analyzing ADCC Asian trials 2025 from Bangkok, Thailand. This is an attempt to analyze data from the toughest and most meaningful tournament on the Asian continent to view the growth of Asian jiu jitsu and predict future trends. first, which countries sent athletes and at what rate? map out text for images. should be 3 images: an initial image with the headline centered, a second explanatory image with a lot of text, and a third image that explains the further data visualizations</text:p>
      <text:p text:style-name="Normal">Post 1: which athletes showed up</text:p>
      <text:p text:style-name="Normal"><text:span text:style-name="T2">IMAGE 1 — COVER</text:span></text:p>
      <text:p text:style-name="Normal"><text:span text:style-name="T3">Headline (centered):</text:span><text:line-break/>ADCC Asian Trials 2025<text:line-break/>Bangkok, Thailand</text:p>
      <text:p text:style-name="Normal"><text:span text:style-name="T4">Subtext (teaser):</text:span><text:line-break/>An analysis of ADCC trials from Bangkok and what the data can show us about the future growth of the sport in Asia.</text:p>
      <text:p text:style-name="Normal"/>
      <text:p text:style-name="Normal"/>
      <text:p text:style-name="Normal"/>
      <text:p text:style-name="Normal">Post 2: which countries performed well</text:p>
      <text:p text:style-name="Normal">End -future predictions about the sports growth in Asia.</text:p>
      <text:p text:style-name="Normal"/>
      <text:p text:style-name="Normal">Post 3: southeast asia overall performance</text:p>
      <text:p text:style-name="Normal">Post 4: east asia overall performance</text:p>
      <text:p text:style-name="Normal">Post 5: Australia and NZ overall performance by gym</text:p>
      <text:p text:style-name="Normal"/>
      <text:p text:style-name="Normal"/>
      <text:p text:style-name="Normal">Comparative analysis of countries that ‘did well’ and ‘sent a lot of athletes’ to the event and level of average income and disposable income</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Robert Diggle</meta:initial-creator>
    <dc:creator>Robert Diggle</dc:creator>
    <meta:creation-date>2026-04-28T16:12:00Z</meta:creation-date>
    <dc:date>2026-04-28T16:44:00Z</dc:date>
    <meta:template xlink:href="Normal.dotm" xlink:type="simple"/>
    <meta:editing-cycles>2</meta:editing-cycles>
    <meta:editing-duration>PT1920S</meta:editing-duration>
    <meta:document-statistic meta:page-count="1" meta:paragraph-count="32" meta:word-count="223" meta:character-count="1129" meta:row-count="40" meta:non-whitespace-character-count="938"/>
  </office:meta>
</office:document-meta>
</file>